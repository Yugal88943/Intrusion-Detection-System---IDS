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hadow="none" style:may-break-between-rows="true" table:border-model="collapsing"/>
    </style:style>
    <style:style style:name="Table1.A" style:family="table-column">
      <style:table-column-properties style:column-width="2.2313in" style:rel-column-width="21845*"/>
    </style:style>
    <style:style style:name="Table1.1" style:family="table-row">
      <style:table-row-properties style:min-row-height="0.3125in"/>
    </style:style>
    <style:style style:name="Table1.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middle" fo:background-color="transparent" fo:padding="0in" fo:border="none" style:writing-mode="page">
        <style:background-image/>
      </style:table-cell-properties>
    </style:style>
    <style:style style:name="Table1.B2" style:family="table-cell">
      <style:table-cell-properties style:vertical-align="middle" fo:background-color="transparent" fo:padding="0in" fo:border="none" style:writing-mode="page">
        <style:background-image/>
      </style:table-cell-properties>
    </style:style>
    <style:style style:name="Table1.C2" style:family="table-cell">
      <style:table-cell-properties style:vertical-align="middle" fo:background-color="transparent" fo:padding="0in" fo:border="none" style:writing-mode="page">
        <style:background-image/>
      </style:table-cell-properties>
    </style:style>
    <style:style style:name="Table1.B3" style:family="table-cell">
      <style:table-cell-properties style:vertical-align="middle" fo:background-color="transparent" fo:padding="0in" fo:border="none" style:writing-mode="page">
        <style:background-image/>
      </style:table-cell-properties>
    </style:style>
    <style:style style:name="Table1.C3" style:family="table-cell">
      <style:table-cell-properties style:vertical-align="middle" fo:background-color="transparent" fo:padding="0in" fo:border="none" style:writing-mode="page">
        <style:background-image/>
      </style:table-cell-properties>
    </style:style>
    <style:style style:name="Table1.B4" style:family="table-cell" style:data-style-name="N0">
      <style:table-cell-properties style:vertical-align="middle" fo:background-color="transparent" fo:padding="0in" fo:border="none" style:writing-mode="page">
        <style:background-image/>
      </style:table-cell-properties>
    </style:style>
    <style:style style:name="Table1.5" style:family="table-row">
      <style:table-row-properties style:min-row-height="0.3125in" fo:keep-together="auto"/>
    </style:style>
    <style:style style:name="Table1.A6"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1.B6"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1.C6"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P1" style:family="paragraph" style:parent-style-name="Horizontal_20_Line">
      <style:paragraph-properties fo:text-align="justify" style:justify-single-word="false"/>
    </style:style>
    <style:style style:name="P2" style:family="paragraph" style:parent-style-name="Standard">
      <style:paragraph-properties fo:text-align="center" style:justify-single-word="false"/>
      <style:text-properties fo:font-weight="bold" officeooo:paragraph-rsid="00061442" style:font-weight-asian="bold"/>
    </style:style>
    <style:style style:name="P3" style:family="paragraph" style:parent-style-name="Standard">
      <style:paragraph-properties fo:text-align="center" style:justify-single-word="false"/>
      <style:text-properties officeooo:paragraph-rsid="000fc357"/>
    </style:style>
    <style:style style:name="P4" style:family="paragraph" style:parent-style-name="Standard">
      <style:paragraph-properties fo:text-align="center" style:justify-single-word="false"/>
      <style:text-properties officeooo:paragraph-rsid="0010700d"/>
    </style:style>
    <style:style style:name="P5" style:family="paragraph" style:parent-style-name="Heading_20_3">
      <style:text-properties fo:font-size="12pt" style:font-size-asian="12pt" style:font-size-complex="12pt"/>
    </style:style>
    <style:style style:name="P6" style:family="paragraph" style:parent-style-name="Heading_20_3">
      <style:text-properties fo:font-size="12pt"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officeooo:paragraph-rsid="001336e6"/>
    </style:style>
    <style:style style:name="P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fdf2" officeooo:paragraph-rsid="0011fdf2"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1776e"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text-align="center" style:justify-single-word="false"/>
      <style:text-properties officeooo:paragraph-rsid="0011fdf2"/>
    </style:style>
    <style:style style:name="P13" style:family="paragraph" style:parent-style-name="Text_20_body" style:list-style-name="L1">
      <style:text-properties fo:font-weight="bold" style:font-weight-asian="bold" style:font-weight-complex="bold"/>
    </style:style>
    <style:style style:name="P14" style:family="paragraph" style:parent-style-name="Text_20_body" style:list-style-name="L2">
      <style:text-properties fo:font-weight="bold" style:font-weight-asian="bold" style:font-weight-complex="bold"/>
    </style:style>
    <style:style style:name="P15" style:family="paragraph" style:parent-style-name="Text_20_body" style:list-style-name="L5">
      <style:text-properties fo:font-weight="bold" style:font-weight-asian="bold" style:font-weight-complex="bold"/>
    </style:style>
    <style:style style:name="P16" style:family="paragraph" style:parent-style-name="Text_20_body" style:list-style-name="L13">
      <style:text-properties fo:font-weight="bold" style:font-weight-asian="bold" style:font-weight-complex="bold"/>
    </style:style>
    <style:style style:name="P17" style:family="paragraph" style:parent-style-name="Text_20_body" style:list-style-name="L16">
      <style:text-properties fo:font-weight="bold" style:font-weight-asian="bold" style:font-weight-complex="bold"/>
    </style:style>
    <style:style style:name="P18" style:family="paragraph" style:parent-style-name="Text_20_body" style:list-style-name="L18">
      <style:text-properties fo:font-weight="bold" style:font-weight-asian="bold" style:font-weight-complex="bold"/>
    </style:style>
    <style:style style:name="P19" style:family="paragraph" style:parent-style-name="Text_20_body" style:list-style-name="L20">
      <style:text-properties fo:font-weight="bold" style:font-weight-asian="bold" style:font-weight-complex="bold"/>
    </style:style>
    <style:style style:name="P20" style:family="paragraph" style:parent-style-name="Text_20_body">
      <style:text-properties fo:font-weight="bold" officeooo:paragraph-rsid="0011fdf2" style:font-weight-asian="bold" style:font-weight-complex="bold"/>
    </style:style>
    <style:style style:name="P21" style:family="paragraph" style:parent-style-name="Text_20_body" style:list-style-name="L17"/>
    <style:style style:name="P22" style:family="paragraph" style:parent-style-name="Text_20_body" style:list-style-name="L17">
      <style:paragraph-properties fo:margin-top="0in" fo:margin-bottom="0in" style:contextual-spacing="false"/>
    </style:style>
    <style:style style:name="P23" style:family="paragraph" style:parent-style-name="Text_20_body" style:list-style-name="L19"/>
    <style:style style:name="P24" style:family="paragraph" style:parent-style-name="Text_20_body" style:list-style-name="L19">
      <style:paragraph-properties fo:margin-top="0in" fo:margin-bottom="0in" style:contextual-spacing="false"/>
    </style:style>
    <style:style style:name="P25" style:family="paragraph" style:parent-style-name="Text_20_body" style:list-style-name="L21"/>
    <style:style style:name="P26" style:family="paragraph" style:parent-style-name="Text_20_body" style:list-style-name="L21">
      <style:paragraph-properties fo:margin-top="0in" fo:margin-bottom="0in" style:contextual-spacing="false"/>
    </style:style>
    <style:style style:name="P27" style:family="paragraph" style:parent-style-name="Text_20_body">
      <style:paragraph-properties fo:text-align="justify" style:justify-single-word="false"/>
    </style:style>
    <style:style style:name="P28" style:family="paragraph" style:parent-style-name="Text_20_body">
      <style:paragraph-properties fo:text-align="justify" style:justify-single-word="false"/>
      <style:text-properties officeooo:paragraph-rsid="0011776e"/>
    </style:style>
    <style:style style:name="P29" style:family="paragraph" style:parent-style-name="Text_20_body" style:list-style-name="L22"/>
    <style:style style:name="P30" style:family="paragraph" style:parent-style-name="Text_20_body" style:list-style-name="L22">
      <style:paragraph-properties fo:margin-top="0in" fo:margin-bottom="0in" style:contextual-spacing="false"/>
    </style:style>
    <style:style style:name="P31" style:family="paragraph" style:parent-style-name="Text_20_body" style:list-style-name="L23"/>
    <style:style style:name="P32" style:family="paragraph" style:parent-style-name="Text_20_body" style:list-style-name="L23">
      <style:paragraph-properties fo:margin-top="0in" fo:margin-bottom="0in" style:contextual-spacing="false"/>
    </style:style>
    <style:style style:name="P33" style:family="paragraph" style:parent-style-name="Text_20_body" style:list-style-name="L24"/>
    <style:style style:name="P34" style:family="paragraph" style:parent-style-name="Text_20_body" style:list-style-name="L24">
      <style:paragraph-properties fo:margin-top="0in" fo:margin-bottom="0in" style:contextual-spacing="false"/>
    </style:style>
    <style:style style:name="P35" style:family="paragraph" style:parent-style-name="Text_20_body" style:list-style-name="L25"/>
    <style:style style:name="P36" style:family="paragraph" style:parent-style-name="Text_20_body" style:list-style-name="L25">
      <style:paragraph-properties fo:margin-top="0in" fo:margin-bottom="0in" style:contextual-spacing="false"/>
    </style:style>
    <style:style style:name="P37" style:family="paragraph" style:parent-style-name="Text_20_body" style:list-style-name="L26"/>
    <style:style style:name="P38" style:family="paragraph" style:parent-style-name="Text_20_body" style:list-style-name="L26">
      <style:paragraph-properties fo:margin-top="0in" fo:margin-bottom="0in" style:contextual-spacing="false"/>
    </style:style>
    <style:style style:name="P39" style:family="paragraph" style:parent-style-name="Text_20_body" style:list-style-name="L27"/>
    <style:style style:name="P40" style:family="paragraph" style:parent-style-name="Text_20_body" style:list-style-name="L27">
      <style:paragraph-properties fo:margin-top="0in" fo:margin-bottom="0in" style:contextual-spacing="false"/>
    </style:style>
    <style:style style:name="P41" style:family="paragraph" style:parent-style-name="Text_20_body" style:list-style-name="L28"/>
    <style:style style:name="P42" style:family="paragraph" style:parent-style-name="Text_20_body" style:list-style-name="L28">
      <style:paragraph-properties fo:margin-top="0in" fo:margin-bottom="0in" style:contextual-spacing="false"/>
    </style:style>
    <style:style style:name="P43" style:family="paragraph" style:parent-style-name="Text_20_body" style:list-style-name="L29"/>
    <style:style style:name="P44" style:family="paragraph" style:parent-style-name="Text_20_body" style:list-style-name="L29">
      <style:paragraph-properties fo:margin-top="0in" fo:margin-bottom="0in" style:contextual-spacing="false"/>
    </style:style>
    <style:style style:name="P45" style:family="paragraph" style:parent-style-name="Text_20_body" style:list-style-name="L30"/>
    <style:style style:name="P46" style:family="paragraph" style:parent-style-name="Text_20_body" style:list-style-name="L30">
      <style:paragraph-properties fo:margin-top="0in" fo:margin-bottom="0in" style:contextual-spacing="false"/>
    </style:style>
    <style:style style:name="P47" style:family="paragraph" style:parent-style-name="Text_20_body" style:list-style-name="L31"/>
    <style:style style:name="P48" style:family="paragraph" style:parent-style-name="Text_20_body" style:list-style-name="L31">
      <style:paragraph-properties fo:margin-top="0in" fo:margin-bottom="0in" style:contextual-spacing="false"/>
    </style:style>
    <style:style style:name="P49" style:family="paragraph" style:parent-style-name="Text_20_body" style:list-style-name="L32"/>
    <style:style style:name="P50" style:family="paragraph" style:parent-style-name="Text_20_body" style:list-style-name="L32">
      <style:paragraph-properties fo:margin-top="0in" fo:margin-bottom="0in" style:contextual-spacing="false"/>
    </style:style>
    <style:style style:name="P51" style:family="paragraph" style:parent-style-name="Text_20_body" style:list-style-name="L36"/>
    <style:style style:name="P52" style:family="paragraph" style:parent-style-name="Text_20_body" style:list-style-name="L36">
      <style:paragraph-properties fo:margin-top="0in" fo:margin-bottom="0in" style:contextual-spacing="false"/>
    </style:style>
    <style:style style:name="P53" style:family="paragraph" style:parent-style-name="Text_20_body">
      <style:text-properties officeooo:paragraph-rsid="0011776e"/>
    </style:style>
    <style:style style:name="P54" style:family="paragraph" style:parent-style-name="Text_20_body" style:list-style-name="L37"/>
    <style:style style:name="P55" style:family="paragraph" style:parent-style-name="Text_20_body" style:list-style-name="L37">
      <style:paragraph-properties fo:margin-top="0in" fo:margin-bottom="0in" style:contextual-spacing="false"/>
    </style:style>
    <style:style style:name="P56" style:family="paragraph" style:parent-style-name="Text_20_body" style:list-style-name="L38"/>
    <style:style style:name="P57" style:family="paragraph" style:parent-style-name="Text_20_body" style:list-style-name="L38">
      <style:paragraph-properties fo:margin-top="0in" fo:margin-bottom="0in" style:contextual-spacing="false"/>
    </style:style>
    <style:style style:name="P58" style:family="paragraph" style:parent-style-name="Text_20_body" style:list-style-name="L39"/>
    <style:style style:name="P59" style:family="paragraph" style:parent-style-name="Text_20_body" style:list-style-name="L39">
      <style:paragraph-properties fo:margin-top="0in" fo:margin-bottom="0in" style:contextual-spacing="false"/>
    </style:style>
    <style:style style:name="P60" style:family="paragraph" style:parent-style-name="Text_20_body" style:list-style-name="L40"/>
    <style:style style:name="P61" style:family="paragraph" style:parent-style-name="Text_20_body" style:list-style-name="L40">
      <style:paragraph-properties fo:margin-top="0in" fo:margin-bottom="0in" style:contextual-spacing="false"/>
    </style:style>
    <style:style style:name="P62" style:family="paragraph" style:parent-style-name="Text_20_body" style:list-style-name="L40">
      <style:paragraph-properties fo:margin-top="0in" fo:margin-bottom="0in" style:contextual-spacing="false"/>
      <style:text-properties officeooo:rsid="0011fdf2" officeooo:paragraph-rsid="0011fdf2"/>
    </style:style>
    <style:style style:name="P63" style:family="paragraph" style:parent-style-name="Text_20_body" style:list-style-name="L41"/>
    <style:style style:name="P64" style:family="paragraph" style:parent-style-name="Text_20_body" style:list-style-name="L41">
      <style:paragraph-properties fo:margin-top="0in" fo:margin-bottom="0in" style:contextual-spacing="false"/>
    </style:style>
    <style:style style:name="P65" style:family="paragraph" style:parent-style-name="Text_20_body" style:list-style-name="L42"/>
    <style:style style:name="P66" style:family="paragraph" style:parent-style-name="Text_20_body" style:list-style-name="L42">
      <style:paragraph-properties fo:margin-top="0in" fo:margin-bottom="0in" style:contextual-spacing="false"/>
    </style:style>
    <style:style style:name="P67" style:family="paragraph" style:parent-style-name="Text_20_body">
      <style:text-properties officeooo:paragraph-rsid="0012f428"/>
    </style:style>
    <style:style style:name="T1" style:family="text">
      <style:text-properties fo:font-weight="bold" style:font-weight-asian="bold" style:font-weight-complex="bold"/>
    </style:style>
    <style:style style:name="T2" style:family="text">
      <style:text-properties fo:font-weight="bold" officeooo:rsid="0011776e" style:font-weight-asian="bold" style:font-weight-complex="bold"/>
    </style:style>
    <style:style style:name="T3" style:family="text">
      <style:text-properties officeooo:rsid="0010700d"/>
    </style:style>
    <style:style style:name="T4" style:family="text">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officeooo:rsid="0012f428"/>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text:start-value="7">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rusion Detection System using Soft Computing</text:p>
      <text:p text:style-name="P3"/>
      <text:p text:style-name="P4">Sujit Hansda<text:line-break/>M.Tech CSE, NIT Jalandhar</text:p>
      <text:p text:style-name="P7"><text:span text:style-name="T3">Roll. No. </text:span>25203033<text:line-break/></text:p>
      <text:p text:style-name="P4"><text:span text:style-name="T5">Yugal</text:span><text:line-break/>M.Tech CSE, NIT Jalandhar</text:p>
      <text:p text:style-name="P4"><text:span text:style-name="T3">Roll. No. 2590305</text:span><text:span text:style-name="T5">3</text:span><text:line-break/></text:p>
      <text:p text:style-name="P3"/>
      <text:list text:style-name="L1">
        <text:list-item>
          <text:p text:style-name="P13">Introduction</text:p>
        </text:list-item>
      </text:list>
      <text:p text:style-name="P27">With the rapid growth of internet-based systems and cloud infrastructure, cyber attacks have become increasingly frequent and sophisticated. Detecting malicious network activities in real time is a major challenge due to the large volume and complexity of network traffic data.</text:p>
      <text:p text:style-name="Text_20_body">Intrusion Detection Systems (IDS) are designed to monitor network traffic and identify suspicious activities. Traditional machine learning techniques often struggle to capture complex non-linear intrusion patterns, resulting in missed attacks and false alarms.</text:p>
      <text:p text:style-name="Text_20_body">This project focuses on developing an Intrusion Detection System using Machine Learning and Soft Computing techniques. Logistic Regression and Artificial Neural Network (ANN) models are implemented and compared using the NSL-KDD dataset.</text:p>
      <text:p text:style-name="Text_20_body">The objective is to improve attack detection capability, reduce false negatives, and analyze the effectiveness of soft computing approaches in intrusion detection.</text:p>
      <text:p text:style-name="Horizontal_20_Line"/>
      <text:list text:style-name="L2">
        <text:list-item>
          <text:p text:style-name="P14">Dataset Description</text:p>
        </text:list-item>
      </text:list>
      <text:p text:style-name="P27">The project uses the NSL-KDD dataset, a widely used benchmark dataset for intrusion detection research.</text:p>
      <text:p text:style-name="Text_20_body">The dataset contains:</text:p>
      <text:list text:style-name="L22">
        <text:list-item>
          <text:p text:style-name="P30">Network traffic records</text:p>
        </text:list-item>
        <text:list-item>
          <text:p text:style-name="P30">41 features per record</text:p>
        </text:list-item>
        <text:list-item>
          <text:p text:style-name="P29">A class label indicating normal or attack traffic</text:p>
        </text:list-item>
      </text:list>
      <text:p text:style-name="Text_20_body">The features include:</text:p>
      <text:list text:style-name="L23">
        <text:list-item>
          <text:p text:style-name="P32">Basic connection features</text:p>
        </text:list-item>
        <text:list-item>
          <text:p text:style-name="P32">Content-based features</text:p>
        </text:list-item>
        <text:list-item>
          <text:p text:style-name="P31">Traffic-based features</text:p>
        </text:list-item>
      </text:list>
      <text:p text:style-name="Text_20_body">Attack categories include:</text:p>
      <text:list text:style-name="L24">
        <text:list-item>
          <text:p text:style-name="P34">Denial of Service (DoS)</text:p>
        </text:list-item>
        <text:list-item>
          <text:p text:style-name="P34">Probe</text:p>
        </text:list-item>
        <text:list-item>
          <text:p text:style-name="P34">Remote to Local (R2L)</text:p>
        </text:list-item>
        <text:list-item>
          <text:p text:style-name="P33">User to Root (U2R)</text:p>
        </text:list-item>
      </text:list>
      <text:p text:style-name="Text_20_body">For this project, the problem is converted into binary classification:</text:p>
      <text:list text:style-name="L25">
        <text:list-item>
          <text:p text:style-name="P36"><text:soft-page-break/>Normal Traffic → 0</text:p>
        </text:list-item>
        <text:list-item>
          <text:p text:style-name="P35">Attack Traffic → 1</text:p>
        </text:list-item>
      </text:list>
      <text:p text:style-name="Text_20_body">The dataset is highly imbalanced, making false negative reduction an important challenge.</text:p>
      <text:p text:style-name="Horizontal_20_Line"/>
      <text:list text:style-name="L5">
        <text:list-item>
          <text:p text:style-name="P15">Methodology</text:p>
        </text:list-item>
      </text:list>
      <text:p text:style-name="P27">The system follows a structured machine learning pipeline consisting of preprocessing, model training, evaluation, and deployment.</text:p>
      <text:p text:style-name="Text_20_body"><text:span text:style-name="T1">3.1 Data Preprocessing</text:span></text:p>
      <text:p text:style-name="P27">Several preprocessing techniques are applied to prepare the dataset for machine learning.</text:p>
      <text:h text:style-name="P5" text:outline-level="3">Steps Performed:</text:h>
      <text:list text:style-name="L26">
        <text:list-item>
          <text:p text:style-name="P38">Removed unnecessary columns</text:p>
        </text:list-item>
        <text:list-item>
          <text:p text:style-name="P38">Converted categorical features using One-Hot Encoding</text:p>
        </text:list-item>
        <text:list-item>
          <text:p text:style-name="P38">Applied feature scaling using StandardScaler</text:p>
        </text:list-item>
        <text:list-item>
          <text:p text:style-name="P37">Performed Train-Test Split (80:20)</text:p>
        </text:list-item>
      </text:list>
      <text:p text:style-name="Text_20_body">Categorical features encoded:</text:p>
      <text:list text:style-name="L27">
        <text:list-item>
          <text:p text:style-name="P40">protocol_type</text:p>
        </text:list-item>
        <text:list-item>
          <text:p text:style-name="P40">service</text:p>
        </text:list-item>
        <text:list-item>
          <text:p text:style-name="P39">flag</text:p>
        </text:list-item>
      </text:list>
      <text:p text:style-name="Text_20_body">The preprocessing pipeline ensures compatibility with machine learning algorithms and improves model performance.</text:p>
      <text:p text:style-name="Text_20_body"><text:span text:style-name="T1">3.2 Logistic Regression</text:span></text:p>
      <text:p text:style-name="P27">Logistic Regression is implemented as the baseline traditional machine learning model.</text:p>
      <text:h text:style-name="P5" text:outline-level="3">Key Characteristics:</text:h>
      <text:list text:style-name="L28">
        <text:list-item>
          <text:p text:style-name="P42">Linear classification algorithm</text:p>
        </text:list-item>
        <text:list-item>
          <text:p text:style-name="P42">Suitable for binary classification</text:p>
        </text:list-item>
        <text:list-item>
          <text:p text:style-name="P41">Fast and computationally efficient</text:p>
        </text:list-item>
      </text:list>
      <text:p text:style-name="Text_20_body">Threshold tuning and class balancing techniques are applied to improve Recall and reduce False Negatives.</text:p>
      <text:h text:style-name="P5" text:outline-level="3">Final Performance:</text:h>
      <text:list text:style-name="L29">
        <text:list-item>
          <text:p text:style-name="P44">Accuracy: 97.43%</text:p>
        </text:list-item>
        <text:list-item>
          <text:p text:style-name="P44">Recall: 97.53%</text:p>
        </text:list-item>
        <text:list-item>
          <text:p text:style-name="P43">AUC Score: 0.9959</text:p>
        </text:list-item>
      </text:list>
      <text:p text:style-name="Text_20_body">The model achieved strong attack detection capability but produced relatively higher false positives.</text:p>
      <text:p text:style-name="Text_20_body"><text:span text:style-name="T1">3.3 Artificial Neural Network (ANN)</text:span></text:p>
      <text:p text:style-name="P27">An Artificial Neural Network (ANN) is implemented using MLPClassifier as the soft computing approach.</text:p>
      <text:h text:style-name="P5" text:outline-level="3"><text:soft-page-break/>ANN Architecture:</text:h>
      <text:list text:style-name="L30">
        <text:list-item>
          <text:p text:style-name="P46">Input Layer</text:p>
        </text:list-item>
        <text:list-item>
          <text:p text:style-name="P46">Hidden Layer (100 neurons)</text:p>
        </text:list-item>
        <text:list-item>
          <text:p text:style-name="P45">Output Layer</text:p>
        </text:list-item>
      </text:list>
      <text:h text:style-name="P5" text:outline-level="3">Advantages:</text:h>
      <text:list text:style-name="L31">
        <text:list-item>
          <text:p text:style-name="P48">Learns complex non-linear intrusion patterns</text:p>
        </text:list-item>
        <text:list-item>
          <text:p text:style-name="P48">Captures hidden feature relationships</text:p>
        </text:list-item>
        <text:list-item>
          <text:p text:style-name="P47">Improves attack classification capability</text:p>
        </text:list-item>
      </text:list>
      <text:h text:style-name="P6" text:outline-level="3">Final Performance:</text:h>
      <text:list text:style-name="L32">
        <text:list-item>
          <text:p text:style-name="P50">Accuracy: 99.67%</text:p>
        </text:list-item>
        <text:list-item>
          <text:p text:style-name="P50">Recall: 99.58%</text:p>
        </text:list-item>
        <text:list-item>
          <text:p text:style-name="P49">AUC Score: 0.9994</text:p>
        </text:list-item>
      </text:list>
      <text:p text:style-name="Text_20_body">ANN significantly reduced false negatives and improved overall intrusion detection performance.</text:p>
      <text:p text:style-name="Horizontal_20_Line"/>
      <text:list text:style-name="L13">
        <text:list-item>
          <text:p text:style-name="P16">Results and Performance Evaluation</text:p>
        </text:list-item>
      </text:list>
      <text:p text:style-name="P27">The models are evaluated using:</text:p>
      <text:list text:style-name="L36">
        <text:list-item>
          <text:p text:style-name="P52">Accuracy</text:p>
        </text:list-item>
        <text:list-item>
          <text:p text:style-name="P52">Recall</text:p>
        </text:list-item>
        <text:list-item>
          <text:p text:style-name="P52">Confusion Matrix</text:p>
        </text:list-item>
        <text:list-item>
          <text:p text:style-name="P52">ROC Curve</text:p>
        </text:list-item>
        <text:list-item>
          <text:p text:style-name="P51">AUC Score</text:p>
        </text:list-item>
      </text:list>
      <text:p text:style-name="P53"><text:span text:style-name="T2">4</text:span><text:span text:style-name="T1">.</text:span><text:span text:style-name="T2">1</text:span><text:span text:style-name="T1"> Logistic Regression Results</text:span></text:p>
      <text:p text:style-name="P28">Confusion Matrix:</text:p>
      <text:list text:style-name="L37">
        <text:list-item>
          <text:p text:style-name="P55">False Positives: 355</text:p>
        </text:list-item>
        <text:list-item>
          <text:p text:style-name="P54">False Negatives: 291</text:p>
        </text:list-item>
      </text:list>
      <text:p text:style-name="Text_20_body">The model achieved high recall after threshold tuning but still produced moderate false alarms.</text:p>
      <text:p text:style-name="P67"><text:span text:style-name="T2">4</text:span><text:span text:style-name="T1">.</text:span><text:span text:style-name="T2">2</text:span><text:span text:style-name="T1"> </text:span><text:span text:style-name="T2">ANN </text:span><text:span text:style-name="T1">Results</text:span></text:p>
      <text:p text:style-name="P67">Confusion Matrix:</text:p>
      <text:list text:style-name="L38">
        <text:list-item>
          <text:p text:style-name="P57">False Positives: 34</text:p>
        </text:list-item>
        <text:list-item>
          <text:p text:style-name="P56">False Negatives: 49</text:p>
        </text:list-item>
      </text:list>
      <text:p text:style-name="Text_20_body">ANN drastically reduced missed attacks and improved detection capability.</text:p>
      <text:p text:style-name="P53"><text:span text:style-name="T2">4</text:span><text:span text:style-name="T1">.</text:span><text:span text:style-name="T2">3</text:span><text:span text:style-name="T1"> </text:span><text:span text:style-name="T2">Model Comparison</text:span></text:p>
      <table:table table:name="Table1" table:style-name="Table1" table:template-name="Academic">
        <table:table-column table:style-name="Table1.A" table:number-columns-repeated="3"/>
        <table:table-row table:style-name="Table1.1">
          <table:table-cell table:style-name="Table1.A1" office:value-type="string">
            <text:p text:style-name="P10">Metric</text:p>
          </table:table-cell>
          <table:table-cell table:style-name="Table1.A1" office:value-type="string">
            <text:p text:style-name="P11">Logistic Regression</text:p>
          </table:table-cell>
          <table:table-cell table:style-name="Table1.A1" office:value-type="string">
            <text:p text:style-name="P11">ANN</text:p>
          </table:table-cell>
        </table:table-row>
        <table:table-row table:style-name="Table1.1">
          <table:table-cell table:style-name="Table1.A2" office:value-type="string">
            <text:p text:style-name="P8">Accuracy</text:p>
          </table:table-cell>
          <table:table-cell table:style-name="Table1.B2" office:value-type="string">
            <text:p text:style-name="P8">97.43%</text:p>
          </table:table-cell>
          <table:table-cell table:style-name="Table1.C2" office:value-type="string">
            <text:p text:style-name="P8">99.67%</text:p>
          </table:table-cell>
        </table:table-row>
        <table:table-row table:style-name="Table1.1">
          <table:table-cell table:style-name="Table1.A2" office:value-type="string">
            <text:p text:style-name="P8">Recall</text:p>
          </table:table-cell>
          <table:table-cell table:style-name="Table1.B3" office:value-type="string">
            <text:p text:style-name="P8">97.53%</text:p>
          </table:table-cell>
          <table:table-cell table:style-name="Table1.C3" office:value-type="string">
            <text:p text:style-name="P8">99.58%</text:p>
          </table:table-cell>
        </table:table-row>
        <text:soft-page-break/>
        <table:table-row table:style-name="Table1.1">
          <table:table-cell table:style-name="Table1.A2" office:value-type="string">
            <text:p text:style-name="P8">False Negatives</text:p>
          </table:table-cell>
          <table:table-cell table:style-name="Table1.B4" office:value-type="float" office:value="291">
            <text:p text:style-name="P8">291</text:p>
          </table:table-cell>
          <table:table-cell table:style-name="Table1.B4" office:value-type="float" office:value="49">
            <text:p text:style-name="P8">49</text:p>
          </table:table-cell>
        </table:table-row>
        <table:table-row table:style-name="Table1.5">
          <table:table-cell table:style-name="Table1.A2" office:value-type="string">
            <text:p text:style-name="P8">False Positives</text:p>
          </table:table-cell>
          <table:table-cell table:style-name="Table1.B4" office:value-type="float" office:value="355">
            <text:p text:style-name="P8">355</text:p>
          </table:table-cell>
          <table:table-cell table:style-name="Table1.B4" office:value-type="float" office:value="34">
            <text:p text:style-name="P8">34</text:p>
          </table:table-cell>
        </table:table-row>
        <table:table-row table:style-name="Table1.1">
          <table:table-cell table:style-name="Table1.A6" office:value-type="string">
            <text:p text:style-name="P8">AUC Score</text:p>
          </table:table-cell>
          <table:table-cell table:style-name="Table1.B6" office:value-type="string">
            <text:p text:style-name="P9">“0.9959”</text:p>
          </table:table-cell>
          <table:table-cell table:style-name="Table1.C6" office:value-type="string">
            <text:p text:style-name="P12"><text:span text:style-name="T4">“</text:span>0.9994<text:span text:style-name="T4">”</text:span></text:p>
          </table:table-cell>
        </table:table-row>
      </table:table>
      <text:p text:style-name="P53"/>
      <text:p text:style-name="P53">The results clearly show that ANN outperformed Logistic Regression in all major evaluation metrics.</text:p>
      <text:p text:style-name="Horizontal_20_Line"/>
      <text:list text:style-name="L16">
        <text:list-item>
          <text:p text:style-name="P17">Visualization and Dashboard</text:p>
        </text:list-item>
      </text:list>
      <text:p text:style-name="Text_20_body">Several visualizations are used to analyze model performance:</text:p>
      <text:list text:style-name="L39">
        <text:list-item>
          <text:p text:style-name="P59">Confusion Matrix</text:p>
        </text:list-item>
        <text:list-item>
          <text:p text:style-name="P59">ROC Curve</text:p>
        </text:list-item>
        <text:list-item>
          <text:p text:style-name="P59">Recall Comparison</text:p>
        </text:list-item>
        <text:list-item>
          <text:p text:style-name="P59">False Negative Comparison</text:p>
        </text:list-item>
        <text:list-item>
          <text:p text:style-name="P58">AUC Analysis</text:p>
        </text:list-item>
      </text:list>
      <text:p text:style-name="Text_20_body">An interactive dashboard is developed using Streamlit.</text:p>
      <text:p text:style-name="P20">Dashboard Features:</text:p>
      <text:list text:style-name="L40">
        <text:list-item>
          <text:p text:style-name="P62">User input interface</text:p>
        </text:list-item>
        <text:list-item>
          <text:p text:style-name="P61">Real-time intrusion prediction</text:p>
        </text:list-item>
        <text:list-item>
          <text:p text:style-name="P61">Logistic Regression prediction</text:p>
        </text:list-item>
        <text:list-item>
          <text:p text:style-name="P61">ANN prediction</text:p>
        </text:list-item>
        <text:list-item>
          <text:p text:style-name="P60">Model selection support</text:p>
        </text:list-item>
      </text:list>
      <text:p text:style-name="Text_20_body">The dashboard demonstrates practical deployment of the intrusion detection system.</text:p>
      <text:p text:style-name="Horizontal_20_Line"/>
      <text:list text:style-name="L18">
        <text:list-item>
          <text:p text:style-name="P18">Conclusion</text:p>
        </text:list-item>
      </text:list>
      <text:p text:style-name="Text_20_body">This project successfully demonstrates the application of Machine Learning and Soft Computing techniques for intrusion detection.</text:p>
      <text:p text:style-name="Text_20_body">Logistic Regression provided strong baseline performance with high recall after optimization. However, the Artificial Neural Network significantly improved overall classification performance by learning complex non-linear intrusion patterns.</text:p>
      <text:p text:style-name="Text_20_body">ANN achieved:</text:p>
      <text:list text:style-name="L41">
        <text:list-item>
          <text:p text:style-name="P64">Higher Recall</text:p>
        </text:list-item>
        <text:list-item>
          <text:p text:style-name="P64">Lower False Negatives</text:p>
        </text:list-item>
        <text:list-item>
          <text:p text:style-name="P64">Lower False Positives</text:p>
        </text:list-item>
        <text:list-item>
          <text:p text:style-name="P63">Better AUC Score</text:p>
        </text:list-item>
      </text:list>
      <text:p text:style-name="Text_20_body">The results confirm that soft computing approaches are more effective for intrusion detection compared to traditional linear models.</text:p>
      <text:p text:style-name="P1"/>
      <text:list text:style-name="L20">
        <text:list-item>
          <text:p text:style-name="P19"><text:soft-page-break/>Future Work</text:p>
        </text:list-item>
      </text:list>
      <text:p text:style-name="Text_20_body">Future improvements may include:</text:p>
      <text:list text:style-name="L42">
        <text:list-item>
          <text:p text:style-name="P66">Deep Learning based IDS models</text:p>
        </text:list-item>
        <text:list-item>
          <text:p text:style-name="P66">Real-time packet capture and monitoring</text:p>
        </text:list-item>
        <text:list-item>
          <text:p text:style-name="P66">Cloud deployment</text:p>
        </text:list-item>
        <text:list-item>
          <text:p text:style-name="P66">Spark Streaming integration</text:p>
        </text:list-item>
        <text:list-item>
          <text:p text:style-name="P66">Explainable AI for attack interpretation</text:p>
        </text:list-item>
        <text:list-item>
          <text:p text:style-name="P65">Full feature deployment using all 41 features</text:p>
        </text:list-item>
      </text:list>
      <text:p text:style-name="Text_20_body">These enhancements can further improve scalability, efficiency, and real-world applicability of the system.</text:p>
      <text:p text:style-name="Horizontal_20_Lin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30T18:12:26.366700112</meta:creation-date>
    <dc:date>2026-05-29T00:37:51.055575849</dc:date>
    <meta:editing-duration>PT31M50S</meta:editing-duration>
    <meta:editing-cycles>6</meta:editing-cycles>
    <meta:generator>LibreOffice/24.2.7.2$Linux_X86_64 LibreOffice_project/420$Build-2</meta:generator>
    <meta:document-statistic meta:table-count="1" meta:image-count="0" meta:object-count="0" meta:page-count="5" meta:paragraph-count="140" meta:word-count="788" meta:character-count="5452" meta:non-whitespace-character-count="4872"/>
  </office:meta>
</office:document-meta>
</file>